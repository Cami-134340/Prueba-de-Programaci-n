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D000000EE998A1E76.png" manifest:media-type="image/png"/>
  <manifest:file-entry manifest:full-path="Pictures/10000000000001D80000001C205ADFD8.png" manifest:media-type="image/png"/>
  <manifest:file-entry manifest:full-path="Pictures/1000000000000229000000359D3CD0F8.png" manifest:media-type="image/png"/>
  <manifest:file-entry manifest:full-path="Pictures/100000000000019C00000022430ACA34.png" manifest:media-type="image/png"/>
  <manifest:file-entry manifest:full-path="Pictures/1000000000000291000000260A4AEFC0.png" manifest:media-type="image/png"/>
  <manifest:file-entry manifest:full-path="Pictures/1000000100000290000001D5955CA8B2.png" manifest:media-type="image/png"/>
  <manifest:file-entry manifest:full-path="Pictures/10000001000002880000024C5F350937.png" manifest:media-type="image/png"/>
  <manifest:file-entry manifest:full-path="Pictures/10000000000002A9000001F082613B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4d8" officeooo:paragraph-rsid="001254d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54d8" officeooo:paragraph-rsid="001254d8" style:font-weight-asian="bold" style:font-weight-complex="bold"/>
    </style:style>
    <style:style style:name="P3" style:family="paragraph" style:parent-style-name="Standard">
      <style:text-properties officeooo:rsid="0013a4ba" officeooo:paragraph-rsid="0013a4ba"/>
    </style:style>
    <style:style style:name="P4" style:family="paragraph" style:parent-style-name="Standard">
      <style:text-properties officeooo:rsid="00147465" officeooo:paragraph-rsid="00147465"/>
    </style:style>
    <style:style style:name="P5" style:family="paragraph" style:parent-style-name="Standard">
      <style:text-properties officeooo:rsid="00154740" officeooo:paragraph-rsid="00154740"/>
    </style:style>
    <style:style style:name="T1" style:family="text">
      <style:text-properties officeooo:rsid="001474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Práctico 1: Servidor de archivos y Administración del Sistema</text:p>
      <text:p text:style-name="P1"/>
      <text:p text:style-name="P1">a) Gestión del sistema.</text:p>
      <text:p text:style-name="P1"/>
      <text:p text:style-name="P1">Se verifica que el servicio SSH esté funcionando.</text:p>
      <text:p text:style-name="P1"/>
      <text:p text:style-name="P1">Instalación de SSH:</text:p>
      <text:p text:style-name="P1"/>
      <text:p text:style-name="P1"><draw:frame draw:style-name="fr2" draw:name="Imagen2" text:anchor-type="char" svg:x="0.695cm" svg:y="0.074cm" svg:width="15.141cm" svg:height="9.29cm" draw:z-index="1"><draw:image xlink:href="Pictures/10000000000002A9000001F082613B17.png" xlink:type="simple" xlink:show="embed" xlink:actuate="onLoad" draw:mime-type="image/png"/></draw:frame></text:p>
      <text:p text:style-name="P1"/>
      <text:p text:style-name="P1"><draw:frame draw:style-name="fr2" draw:name="Imagen1" text:anchor-type="char" svg:x="0.767cm" svg:y="0.877cm" svg:width="15.037cm" svg:height="10.95cm" draw:z-index="0"><draw:image xlink:href="Pictures/1000000100000290000001D5955CA8B2.png" xlink:type="simple" xlink:show="embed" xlink:actuate="onLoad" draw:mime-type="image/png"/></draw:frame>Verificación de estatus:</text:p>
      <text:p text:style-name="P1"><text:soft-page-break/></text:p>
      <text:p text:style-name="P1">b) Permisos y directorios.</text:p>
      <text:p text:style-name="P1"/>
      <text:p text:style-name="P1">Crear directorio /usuario/administracion</text:p>
      <text:p text:style-name="P1"><draw:frame draw:style-name="fr2" draw:name="Imagen3" text:anchor-type="char" svg:x="0.238cm" svg:y="0.445cm" svg:width="17cm" svg:height="0.982cm" draw:z-index="2"><draw:image xlink:href="Pictures/1000000000000291000000260A4AEFC0.png" xlink:type="simple" xlink:show="embed" xlink:actuate="onLoad" draw:mime-type="image/png"/></draw:frame></text:p>
      <text:p text:style-name="P3">Agregar grupo “Programadores” <text:span text:style-name="T1">y agregarlo al directorio</text:span>:</text:p>
      <text:p text:style-name="P3"/>
      <text:p text:style-name="P3"><draw:frame draw:style-name="fr3" draw:name="Imagen4" text:anchor-type="char" svg:width="10.901cm" svg:height="0.9cm" draw:z-index="3"><draw:image xlink:href="Pictures/100000000000019C00000022430ACA34.png" xlink:type="simple" xlink:show="embed" xlink:actuate="onLoad" draw:mime-type="image/png"/></draw:frame></text:p>
      <text:p text:style-name="P1"/>
      <text:p text:style-name="P1"><draw:frame draw:style-name="fr2" draw:name="Imagen5" text:anchor-type="char" svg:x="1.185cm" svg:y="0.392cm" svg:width="14.631cm" svg:height="1.402cm" draw:z-index="4"><draw:image xlink:href="Pictures/1000000000000229000000359D3CD0F8.png" xlink:type="simple" xlink:show="embed" xlink:actuate="onLoad" draw:mime-type="image/png"/></draw:frame></text:p>
      <text:p text:style-name="P1"/>
      <text:p text:style-name="P4">Asignar permisos al directorio:</text:p>
      <text:p text:style-name="P4"><draw:frame draw:style-name="fr2" draw:name="Imagen6" text:anchor-type="char" svg:x="1.965cm" svg:y="0.191cm" svg:width="12.488cm" svg:height="0.741cm" draw:z-index="5"><draw:image xlink:href="Pictures/10000000000001D80000001C205ADFD8.png" xlink:type="simple" xlink:show="embed" xlink:actuate="onLoad" draw:mime-type="image/png"/></draw:frame></text:p>
      <text:p text:style-name="P4"/>
      <text:p text:style-name="P4"/>
      <text:p text:style-name="P4">c) Programación de tareas:</text:p>
      <text:p text:style-name="P4"/>
      <text:p text:style-name="P5">abrir crontab</text:p>
      <text:p text:style-name="P4"><draw:frame draw:style-name="fr2" draw:name="Imagen7" text:anchor-type="char" svg:x="1.767cm" svg:y="0.418cm" svg:width="13.467cm" svg:height="6.297cm" draw:z-index="6"><draw:image xlink:href="Pictures/10000000000001FD000000EE998A1E7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insertar la tarea programada para hacer backup en el archivo crontab:</text:p>
      <text:p text:style-name="P4"/>
      <text:p text:style-name="P4"><draw:frame draw:style-name="fr1" draw:name="Imagen8" text:anchor-type="char" svg:width="17cm" svg:height="13.954cm" draw:z-index="7"><draw:image xlink:href="Pictures/10000001000002880000024C5F3509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9:55:37.079752071</meta:creation-date>
    <dc:date>2026-06-22T20:57:01.441300568</dc:date>
    <meta:editing-duration>PT11M27S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3" meta:paragraph-count="12" meta:word-count="63" meta:character-count="447" meta:non-whitespace-character-count="396"/>
  </office:meta>
</office:document-meta>
</file>